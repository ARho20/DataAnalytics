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ore_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Store</text:p>
          </table:table-cell>
          <table:table-cell office:value-type="string" table:style-name="ce1">
            <text:p>Monthly Sa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A</text:p>
          </table:table-cell>
          <table:table-cell office:value-type="float" office:value="51" table:style-name="ce1">
            <text:p>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B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C</text:p>
          </table:table-cell>
          <table:table-cell office:value-type="float" office:value="49" table:style-name="ce1">
            <text:p>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D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E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F</text:p>
          </table:table-cell>
          <table:table-cell office:value-type="float" office:value="47" table:style-name="ce1">
            <text:p>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G</text:p>
          </table:table-cell>
          <table:table-cell office:value-type="float" office:value="45" table:style-name="ce1">
            <text:p>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H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I</text:p>
          </table:table-cell>
          <table:table-cell office:value-type="float" office:value="43" table:style-name="ce1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J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K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L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n</text:p>
          </table:table-cell>
          <table:table-cell office:value-type="float" office:value="49.416666666666664" table:formula="of:=AVERAGE([.B2:.B13])" table:style-name="ce1">
            <text:p>49.41666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dian</text:p>
          </table:table-cell>
          <table:table-cell office:value-type="float" office:value="47.5" table:formula="of:=MEDIAN([.B2:.B13])" table:style-name="ce1">
            <text:p>47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e</text:p>
          </table:table-cell>
          <table:table-cell office:value-type="float" office:value="46" table:formula="of:=MODE([.B2:.B13])" table:style-name="ce1">
            <text:p>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e</text:p>
          </table:table-cell>
          <table:table-cell office:value-type="float" office:value="29" table:formula="of:=MAX([.B2:.B13]) - MIN([.B2:.B13])" table:style-name="ce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ndard Deviation</text:p>
          </table:table-cell>
          <table:table-cell office:value-type="float" office:value="7.6331613054586773" table:formula="of:=STDEV([.B2:.B13])" table:style-name="ce1">
            <text:p>7.63316130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.9076701075853588" table:formula="of:=STDEV([.B2:.B8]; [.B10:.B13])" table:style-name="ce1">
            <text:p>2.907670108</text:p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  <table:table table:name="Store_Summary" table:style-name="ta1">
        <table:table-column table:style-name="co3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4" draw:name="TextBox 3" svg:x="0.02083in" svg:y="0.13889in" svg:width="5.99306in" svg:height="3.42361in">
              <draw:text-box>
                <text:p text:style-name="a3" text:class-names="" text:cond-style-name=""><text:span text:style-name="a0" text:class-names="">The average</text:span><text:span text:style-name="a1" text:class-names=""><text:s text:c="1"/>sales across all stores came to 49.42. Most of the stores had similar sales, so the data is fairly consistent. However, Store H had much higher sales than the others, which made the date more spread out. When Store H was removed, the standard deviation went down, showing it had a strong impact on the results. If I had more information, I would want to know why that store had higher sales than the others.<text:s text:c="1"/></text:span><text:span text:style-name="a2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aspenne rhoden</meta:initial-creator>
    <dc:creator>aspenne rhoden</dc:creator>
    <meta:creation-date>2026-03-26T23:48:11Z</meta:creation-date>
    <dc:date>2026-03-27T02:11:42Z</dc:date>
  </office:meta>
</office:document-meta>
</file>